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right" style:justify-single-word="false"/>
    </style:style>
    <style:style style:name="P4" style:family="paragraph" style:parent-style-name="Heading_20_1" style:list-style-nam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art 1: Situation Analysis</text:h>
      <text:p text:style-name="Standard"/>
      <text:p text:style-name="Standard">My recipient is Mr. López, a customer who brought his laptop to AB7ECH Technical Support for a motherboard replacement. Although our relationship is professional rather than personal, maintaining his trust is very important because customers depend on honest communication and reliable service. The purpose of this email is to inform him that the replacement motherboard we received from our supplier was defective and that the repair will be delayed by approximately three business days while we wait for a new part. My goal is to explain the reason for the delay clearly, apologize for the inconvenience, and reassure him that we are committed to completing the repair correctly. Email is the most appropriate communication channel because it provides a written record of the update that the customer can review later if needed. It also allows me to communicate the information clearly without interrupting his schedule, unlike a phone call, which he might miss. Timing is important because the customer expected his laptop soon. Sending the email as soon as the problem was discovered demonstrates professionalism, transparency, and respect by giving him advance notice instead of waiting until the original delivery date.</text:p>
      <text:p text:style-name="Standard"/>
      <text:h text:style-name="P1" text:outline-level="1">Part 2: Professional Email</text:h>
      <text:p text:style-name="Standard"/>
      <text:p text:style-name="P2">Subject: Delivery Update: Laptop Repair Delay</text:p>
      <text:p text:style-name="Standard"/>
      <text:p text:style-name="Standard">Dear Mr. López,</text:p>
      <text:p text:style-name="Standard"/>
      <text:p text:style-name="Standard">Thank you for trusting AB7ECH Technical Support with the repair of your laptop. I am writing to provide you with an important update regarding your repair.</text:p>
      <text:p text:style-name="Standard"/>
      <text:p text:style-name="Standard">Unfortunately, the replacement motherboard we received from our supplier was found to be defective during our inspection. Installing the part could affect the reliability and safety of your laptop, so we have decided not to proceed until a fully functional replacement arrives.</text:p>
      <text:p text:style-name="Standard"/>
      <text:p text:style-name="Standard">To ensure your laptop meets our quality standards, we have already ordered a new motherboard, which is expected to arrive within approximately three business days. In the meantime, I will continue monitoring your repair and keep you informed of any updates. Once the repair is completed and tested, I will contact you immediately so you can arrange pickup.</text:p>
      <text:p text:style-name="Standard"/>
      <text:p text:style-name="Standard">I sincerely apologize for the inconvenience and appreciate your patience and understanding. Thank you for your trust. We remain committed to providing you with reliable, high-quality service.</text:p>
      <text:p text:style-name="Standard"/>
      <text:p text:style-name="Standard">Best regards,</text:p>
      <text:p text:style-name="Standard"/>
      <text:p text:style-name="P3">Saúl Abraham Arana Calderón</text:p>
      <text:p text:style-name="P3">AB7ECH Technical Support</text:p>
      <text:h text:style-name="P4" text:outline-level="1"/>
      <text:h text:style-name="P1" text:outline-level="1">Part 3: Rhetorical Analysis</text:h>
      <text:p text:style-name="Standard"/>
      <text:p text:style-name="Standard">In this email, I primarily emphasized logos because the main purpose was to explain a repair delay using clear facts and logical reasoning. The sentence, “Unfortunately, the replacement motherboard we received from our supplier was found to be defective during our inspection,” provides the specific reason for the delay and helps the customer understand that the decision was based on quality and safety rather than poor planning. I also included ethos by presenting myself professionally, taking responsibility for communicating the issue, and reinforcing our commitment to high-quality service. Pathos appears in my apology and appreciation for the customer's patience, which acknowledges the inconvenience without becoming overly emotional. Finally, kairos is reflected in sending the email as soon as the problem was identified, giving the customer advance notice before the expected delivery date.</text:p>
      <text:p text:style-name="Standard"/>
      <text:p text:style-name="Standard">My understanding of the audience strongly influenced my word choice and tone. Because the recipient is a customer instead of a coworker, I avoided technical jargon and used respectful, reassuring language that builds trust. My purpose was not only to notify the customer of the delay but also to preserve confidence in our service.</text:p>
      <text:p text:style-name="Standard"/>
      <text:p text:style-name="Standard">I believe the strongest part of the email is the clear explanation of the problem followed by a specific plan for resolving it. This combination reduces uncertainty and demonstrates professionalism. If I were writing to my supervisor instead of a customer, I would include more technical details about the defective motherboard, supplier information, and scheduling impacts rather than focusing on reassurance. Finally, I chose email as the communication channel because it creates a written record, allows the customer to review the information at any time, and communicates the update professionally without requiring immediate availabilit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15T01:22:27.006956237</meta:creation-date>
    <dc:date>2026-07-18T11:42:26.646196717</dc:date>
    <meta:editing-duration>PT4M59S</meta:editing-duration>
    <meta:editing-cycles>2</meta:editing-cycles>
    <meta:generator>LibreOffice/26.2.4.2$Linux_X86_64 LibreOffice_project/620$Build-2</meta:generator>
    <meta:print-date>2026-07-18T11:42:50.656739676</meta:print-date>
    <meta:printed-by>PDF files</meta:printed-by>
    <meta:document-statistic meta:table-count="0" meta:image-count="0" meta:object-count="0" meta:page-count="3" meta:paragraph-count="16" meta:word-count="654" meta:character-count="4284" meta:non-whitespace-character-count="3646"/>
  </office:meta>
</office:document-meta>
</file>