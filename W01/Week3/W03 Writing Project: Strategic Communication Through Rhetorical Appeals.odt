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ep 1: Scenario and Audience</text:h>
      <text:h text:style-name="Heading_20_2" text:outline-level="2">Scenario:</text:h>
      <text:p text:style-name="Standard"/>
      <text:p text:style-name="Standard">I am writing a professional request to a customer service representative at Pollo Campero to request assistance in resolving two charges that appeared on my bank account after two unsuccessful payment attempts through the mobile application.</text:p>
      <text:p text:style-name="Standard"/>
      <text:h text:style-name="Heading_20_2" text:outline-level="2">Recipient:</text:h>
      <text:p text:style-name="Standard"/>
      <text:p text:style-name="Standard">The recipient is María José Méndez Sinay, a customer service representative at Pollo Campero. Although I do not know her personally, I understand that her role requires her to handle customer concerns professionally, review information, and follow company procedures before approving a solution. Because she communicates with many customers, I expect her to value emails that are respectful, organized, and supported by clear information rather than emotional complaints. As a customer service professional in Guatemala, she is also likely to appreciate courteous communication that maintains professionalism while showing respect for her position.</text:p>
      <text:p text:style-name="Standard"/>
      <text:h text:style-name="Heading_20_1" text:outline-level="1">Step 2: Appeals Selected</text:h>
      <text:h text:style-name="Heading_20_2" text:outline-level="2">Version A:</text:h>
      <text:p text:style-name="Standard">Logos. I chose logos because customer service representatives usually make decisions based on facts, evidence, dates, and documentation rather than emotions.</text:p>
      <text:h text:style-name="Heading_20_2" text:outline-level="2">Version B:</text:h>
      <text:p text:style-name="Standard">Ethos. I chose ethos because demonstrating honesty, professionalism, and respect can help establish credibility and encourage a positive working relationship during the resolution process.</text:p>
      <text:p text:style-name="Standard"/>
      <text:h text:style-name="Heading_20_1" text:outline-level="1">Step 3: The Two Messages</text:h>
      <text:h text:style-name="Heading_20_2" text:outline-level="2">Version A (Logos)</text:h>
      <text:p text:style-name="Standard"><text:span text:style-name="T1">Subject</text:span>: Request for Assistance Regarding Duplicate Card Charges</text:p>
      <text:p text:style-name="Standard"/>
      <text:p text:style-name="Standard">Dear María José Méndez Sinay,</text:p>
      <text:p text:style-name="Standard"/>
      <text:p text:style-name="Standard">I hope you are doing well.</text:p>
      <text:p text:style-name="Standard"/>
      <text:p text:style-name="Standard">I am contacting you regarding an issue with an order placed through the Pollo Campero mobile application. During the checkout process, my card was declined twice according to the application; however, both transactions were later charged to my bank account.</text:p>
      <text:p text:style-name="Standard"><text:soft-page-break/></text:p>
      <text:p text:style-name="Standard">Because the order was never completed successfully, I would appreciate your assistance in reviewing these transactions. I have attached screenshots of the payment attempts and my bank statement showing both charges.</text:p>
      <text:p text:style-name="Standard"/>
      <text:p text:style-name="Standard">I understand that payment investigations require verification, and I am happy to provide any additional information you may need. Thank you for your time and for helping me resolve this situation.</text:p>
      <text:p text:style-name="Standard"/>
      <text:p text:style-name="Standard">Kind regards,</text:p>
      <text:p text:style-name="Standard"/>
      <text:p text:style-name="Standard">Saúl Abraham Arana Calderón</text:p>
      <text:p text:style-name="Standard"/>
      <text:h text:style-name="Heading_20_2" text:outline-level="2">Version B (Ethos)</text:h>
      <text:p text:style-name="Standard"/>
      <text:p text:style-name="Standard"><text:span text:style-name="T1">Subject</text:span>: Assistance Request for Duplicate Charges</text:p>
      <text:p text:style-name="Standard"/>
      <text:p text:style-name="Standard">Dear María José Méndez Sinay,</text:p>
      <text:p text:style-name="Standard"/>
      <text:p text:style-name="Standard">I hope you are having a pleasant day.</text:p>
      <text:p text:style-name="Standard"/>
      <text:p text:style-name="Standard">I am writing to request your assistance with an issue I experienced while placing an order through the Pollo Campero app. Although the application reported that my payment attempts were unsuccessful, I later noticed that both transactions were charged to my account.</text:p>
      <text:p text:style-name="Standard"/>
      <text:p text:style-name="Standard">I understand that situations like this may require careful review, and I appreciate the work your team does to investigate customer concerns fairly. I have included the supporting documents so the information can be verified easily. I would be grateful for any guidance or assistance you can provide in resolving this matter.</text:p>
      <text:p text:style-name="Standard"/>
      <text:p text:style-name="Standard">Thank you very much for your time and professionalism.</text:p>
      <text:p text:style-name="Standard"/>
      <text:p text:style-name="Standard">Sincerely,</text:p>
      <text:p text:style-name="Standard"/>
      <text:p text:style-name="Standard">Saúl Abraham Arana Calderón</text:p>
      <text:p text:style-name="Standard"/>
      <text:h text:style-name="Heading_20_1" text:outline-level="1">Step 4: Analysis of Each Message</text:h>
      <text:h text:style-name="Heading_20_2" text:outline-level="2">Analysis of Version A</text:h>
      <text:p text:style-name="Standard"/>
      <text:p text:style-name="Standard">Version A relies primarily on logos by presenting the situation in a logical sequence supported by evidence. The sentence, "I have attached screenshots of the payment attempts and my bank statement showing both charges," strengthens the appeal because it provides objective proof instead of relying on opinion. The message also explains the cause of the request and the desired outcome in a clear order. This strategy is appropriate for María José Méndez Sinay because customer service representatives <text:soft-page-break/>generally make decisions according to documented information and company procedures, making factual communication the most effective approach.</text:p>
      <text:p text:style-name="Standard"/>
      <text:h text:style-name="Heading_20_2" text:outline-level="2">Analysis of Version B</text:h>
      <text:p text:style-name="Standard"/>
      <text:p text:style-name="Standard">Version B emphasizes ethos by establishing credibility and respect throughout the message. The sentence, "I understand that situations like this may require careful review, and I appreciate the work your team does to investigate customer concerns fairly," demonstrates trust in the recipient's professionalism instead of assigning blame. This respectful tone helps portray me as a reasonable customer seeking cooperation rather than confrontation. Because María José Méndez Sinay works in customer service, a professional and courteous approach is likely to encourage a positive interaction while reinforcing my credibility as someone making a legitimate request.</text:p>
      <text:p text:style-name="Standard"/>
      <text:h text:style-name="Heading_20_1" text:outline-level="1">Step 5: Reflection</text:h>
      <text:p text:style-name="Standard"/>
      <text:p text:style-name="Standard">Both messages communicate the same request, but they use different persuasive strategies. The logos version focuses on objective facts and supporting evidence, while the ethos version builds trust through professionalism and respect. If I had to choose one to send, I would select Version A because customer service representatives are typically required to evaluate claims based on documentation and company policies. Although courtesy is important in Guatemalan professional communication, I believe that presenting organized evidence gives María José Méndez Sinay the information she needs to process the request efficiently. The respectful tone remains present, but the logical structure makes the request stronger and more likely to receive a prompt resol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8T12:28:42.022811314</meta:creation-date>
    <dc:date>2026-07-23T01:04:34.295716445</dc:date>
    <meta:editing-duration>PT19M11S</meta:editing-duration>
    <meta:editing-cycles>2</meta:editing-cycles>
    <meta:generator>LibreOffice/26.2.4.2$Linux_X86_64 LibreOffice_project/620$Build-2</meta:generator>
    <meta:document-statistic meta:table-count="0" meta:image-count="0" meta:object-count="0" meta:page-count="3" meta:paragraph-count="36" meta:word-count="767" meta:character-count="5173" meta:non-whitespace-character-count="4442"/>
  </office:meta>
</office:document-meta>
</file>